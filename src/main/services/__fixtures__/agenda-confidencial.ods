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genda" table:style-name="ta1">
        <table:table-row>
          <table:table-cell office:value-type="string">
            <text:p>Nombre</text:p>
          </table:table-cell>
          <table:table-cell office:value-type="string">
            <text:p>Categoría</text:p>
          </table:table-cell>
          <table:table-cell office:value-type="string">
            <text:p>Servicio</text:p>
          </table:table-cell>
          <table:table-cell office:value-type="string">
            <text:p>Número 1</text:p>
          </table:table-cell>
          <table:table-cell office:value-type="string">
            <text:p>Número 2</text:p>
          </table:table-cell>
          <table:table-cell office:value-type="string">
            <text:p>Número 3</text:p>
          </table:table-cell>
          <table:table-cell office:value-type="string">
            <text:p>Número 4</text:p>
          </table:table-cell>
          <table:table-cell office:value-type="string">
            <text:p>Número 5</text:p>
          </table:table-cell>
          <table:table-cell office:value-type="string">
            <text:p>Número 6</text:p>
          </table:table-cell>
          <table:table-cell office:value-type="string">
            <text:p>Número 7</text:p>
          </table:table-cell>
          <table:table-cell office:value-type="string">
            <text:p>Horario</text:p>
          </table:table-cell>
          <table:table-cell office:value-type="string">
            <text:p>Confidencial</text:p>
          </table:table-cell>
          <table:table-cell office:value-type="string">
            <text:p>Edificio</text:p>
          </table:table-cell>
          <table:table-cell office:value-type="string">
            <text:p>Planta</text:p>
          </table:table-cell>
          <table:table-cell office:value-type="string">
            <text:p>Sector</text:p>
          </table:table-cell>
          <table:table-cell office:value-type="string">
            <text:p>Sección</text:p>
          </table:table-cell>
          <table:table-cell office:value-type="string">
            <text:p>Comentarios</text:p>
          </table:table-cell>
        </table:table-row>
        <table:table-row>
          <table:table-cell office:value-type="string">
            <text:p>Admisión Central</text:p>
          </table:table-cell>
          <table:table-cell office:value-type="string">
            <text:p/>
          </table:table-cell>
          <table:table-cell office:value-type="string">
            <text:p>Admisión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misión Central (Interno)</text:p>
          </table:table-cell>
          <table:table-cell office:value-type="string">
            <text:p/>
          </table:table-cell>
          <table:table-cell office:value-type="string">
            <text:p>Admisión</text:p>
          </table:table-cell>
          <table:table-cell office:value-type="string">
            <text:p>1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3</meta:generator>
  </office:meta>
</office:document-meta>
</file>